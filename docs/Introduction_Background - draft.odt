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ortest path problem asks: What is the shortest path from a starting location to a destination? Edsger Dijkstra developed a solution while pondering the same question, in the context of travelling efficiently from city to city through the Netherlands. Today, variations of Dijkstra’s algorithm form the backbone of services such as GPS navigation, network traffic handling, and social media networks, just to name a few. </text:p>
      <text:p text:style-name="Standard"/>
      <text:p text:style-name="Standard">Any problem that requires a single source shortest path solution is a problem where Dijkstra is likely applicable, with one caveat. The edges of the graph must not be negatively-weighted. This is because Dijkstra’s algorithm operates on an assumption that the sum of the weights of any path through a graph will always be greater than or equal to the number of edges on that path. This assumption underlies the algorithm’s greedy nature; it can choose the locally optimal solution at every point and still guarantee that it will find the globally optimal solution by the end. The possibility of negatively weighted edges breaks this property. Additionally, this underlying assumption means that any cycle where the sum of its edges is negative will cause Dijkstra to get caught in an infinite loop. </text:p>
      <text:p text:style-name="Standard"/>
      <text:p text:style-name="Standard">There are two mechanisms in Dijkstra’s algorithm that are responsible for its failure with negative weights. However, they are also at the core of the algorithm’s efficiency in appropriate use cases. As it traverses the graph, it tracks the shortest known path to every node it has encountered so far. As each new node is visited, new information is gained and the shortest known paths are updated if shorter paths are discovered. This process is known as relaxation, and it ensures that the algorithm has the information necessary to choose the optimal solution at every node. Another piece of choosing the optimal solution is the data structure that manages traversal. Implemented as a min-heap, Dijkstra utilizes a priority queue to store unvisited nodes. Every time the algorithm is ready to select a new node, it pops the queue and receives the node at the minimum distance from the currently selected nod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3" meta:word-count="349" meta:character-count="2137" meta:non-whitespace-character-count="1789"/>
    <meta:generator>LibreOfficeDev/6.0.5.2$Linux_X86_64 LibreOffice_project/</meta:generator>
  </office:meta>
</office:document-meta>
</file>